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Hiperv_237_nculo" style:data-style-name="N3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price</text:p>
          </table:table-cell>
          <table:table-cell office:value-type="string" table:style-name="ce2">
            <text:p>ima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de envasado al vacío multifunción, 3 en 1, para café en polvo instantáneo</text:p>
          </table:table-cell>
          <table:table-cell office:value-type="float" office:value="49920" table:style-name="ce2">
            <text:p>49920</text:p>
          </table:table-cell>
          <table:table-cell office:value-type="string" table:style-name="ce3">
            <text:p><text:a xlink:href="https://s.alicdn.com/@sc04/kf/Hfc14b3e5884a4714bb764fb8b15e2c9aS.jpg_300x300.jpg">https://s.alicdn.com/@sc04/kf/Hfc14b3e5884a4714bb764fb8b15e2c9aS.jpg</text:a>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ran oferta, tostador automático de anacardos, 50kg, 100Kg, 200kg, 300kg, cacahuetes, máquina tostadora de granos de cacao</text:p>
          </table:table-cell>
          <table:table-cell office:value-type="float" office:value="16217.760000000002" table:style-name="ce2">
            <text:p>16217,76</text:p>
          </table:table-cell>
          <table:table-cell office:value-type="string" table:style-name="ce2">
            <text:p>https://s.alicdn.com/@sc04/kf/H9bbc6f4a56cd4d4eb5b236a0f0b20b4fS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Empacadora Horizontal Automática al Vacío para Llenado de Bolsas Doypack Preformadas de Papel Kraft o Plástico con Cierre para Granos de Café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ttps://s.alicdn.com/@sc04/kf/H44ae6a55f2eb4e568582e51d33d2ba28g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mercial 50kg 100kg Equipo de procesamiento de horneado Tambor rotativo de gas eléctrico Anacardo Cacao Bean Máquina tostadora de cacao</text:p>
          </table:table-cell>
          <table:table-cell office:value-type="float" office:value="23712" table:style-name="ce2">
            <text:p>23712</text:p>
          </table:table-cell>
          <table:table-cell office:value-type="string" table:style-name="ce2">
            <text:p>https://s.alicdn.com/@sc04/kf/H71515a880cd14d3ebff81950206c843fr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automática de envasado de granos de café en polvo, fuelle lateral de fondo plano, con sello al vacío de descarga de nitrógeno, aprobado por la CE</text:p>
          </table:table-cell>
          <table:table-cell office:value-type="float" office:value="49920" table:style-name="ce2">
            <text:p>49920</text:p>
          </table:table-cell>
          <table:table-cell office:value-type="string" table:style-name="ce2">
            <text:p>https://s.alicdn.com/@sc04/kf/H41bea25aea394495980b3d2d3b2ec94bZ.png_300x300.p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olino Comercial de Piedra Húmeda de 100L para Procesamiento de Cacao Melanger Refinador y Moledor de Chocolate</text:p>
          </table:table-cell>
          <table:table-cell office:value-type="float" office:value="14851.2" table:style-name="ce2">
            <text:p>14851,2</text:p>
          </table:table-cell>
          <table:table-cell office:value-type="string" table:style-name="ce2">
            <text:p>https://s.alicdn.com/@sc04/kf/Hc30d3e5495654db8883265663d3783ad8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elladora al Vacío Eléctrica de Sobremesa de Acero Inoxidable de Cámara Única para Alimentos Secos Máquina Pequeña de Envasado al Vacío con Cámara Interna</text:p>
          </table:table-cell>
          <table:table-cell office:value-type="float" office:value="1971.84" table:style-name="ce2">
            <text:p>1971,84</text:p>
          </table:table-cell>
          <table:table-cell office:value-type="string" table:style-name="ce2">
            <text:p>https://s.alicdn.com/@sc04/kf/H93b5707390a64bb8b2c6246ff5093e2dV.png_300x300.p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ínea de Producción Automática de Cacao en Polvo GELGOOG, Máquina Procesadora de Cacao en Polvo</text:p>
          </table:table-cell>
          <table:table-cell office:value-type="float" office:value="134160" table:style-name="ce2">
            <text:p>134160</text:p>
          </table:table-cell>
          <table:table-cell office:value-type="string" table:style-name="ce2">
            <text:p>https://s.alicdn.com/@sc04/kf/Hdf928228e6004fa1b523c6a6799549e7e.png_300x300.p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automática de envasado al vacío de bolsas de café, embalaje de alimentos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ttps://s.alicdn.com/@sc04/kf/H1d7121453d4c474eaa87953fc5dea2f6i.png_300x300.p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lanta de Equipos para Pasta de Cacao, Línea de Producción de Licor, Máquina Procesadora de Granos de Cacao en Polvo Alcalinizado</text:p>
          </table:table-cell>
          <table:table-cell office:value-type="float" office:value="62400" table:style-name="ce2">
            <text:p>62400</text:p>
          </table:table-cell>
          <table:table-cell office:value-type="string" table:style-name="ce2">
            <text:p>https://s.alicdn.com/@sc04/kf/H08704e03c2294728a1bee7f9b871bc9ax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de Tostado Electromagnética Totalmente Automática para Frutos Secos, Granos, Alimentos Inflados, Comida para Mascotas y Bebidas</text:p>
          </table:table-cell>
          <table:table-cell office:value-type="float" office:value="31200" table:style-name="ce2">
            <text:p>31200</text:p>
          </table:table-cell>
          <table:table-cell office:value-type="string" table:style-name="ce2">
            <text:p>https://s.alicdn.com/@sc04/kf/H3c716f6b2a7f405db14468659df2c9e3o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s para el Procesamiento de Cacao, Cortadoras de Vainas de Cacao Frescas, Separadoras de Cáscara de Cacao, Máquina Separadora de Granos</text:p>
          </table:table-cell>
          <table:table-cell office:value-type="float" office:value="31200" table:style-name="ce2">
            <text:p>31200</text:p>
          </table:table-cell>
          <table:table-cell office:value-type="string" table:style-name="ce2">
            <text:p>https://s.alicdn.com/@sc04/kf/H08059a2c15c146ff99454d52d97de880e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olsa de café al vacío para café 16oz 32 oz, material de embalaje personalizado, 12oz, válvula de cremallera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ttps://s.alicdn.com/@sc04/kf/H7b5c7c293348437f986f65efb062b1cdV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de procesamiento de acero inoxidable, equipo de prensa de mantequilla, tostador de granos de cacao, fabricante de molinillo de cacao</text:p>
          </table:table-cell>
          <table:table-cell office:value-type="float" office:value="7488" table:style-name="ce2">
            <text:p>7488</text:p>
          </table:table-cell>
          <table:table-cell office:value-type="string" table:style-name="ce2">
            <text:p>https://s.alicdn.com/@sc04/kf/H17b69a1cf96c4824963465f0af94ba3co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Tostadora de Café Industrial a Gran Escala Profesional de Fábrica Yoshan 20kg 30kg 50kg 60kg</text:p>
          </table:table-cell>
          <table:table-cell office:value-type="float" office:value="56153.760000000002" table:style-name="ce2">
            <text:p>56153,76</text:p>
          </table:table-cell>
          <table:table-cell office:value-type="string" table:style-name="ce2">
            <text:p>https://s.alicdn.com/@sc04/kf/H4e3bdf7e4fbc48fd8d99a7871329fc2eQ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s de procesamiento de cacao, máquina separadora de granos de cáscara de coco, para cortar y separar</text:p>
          </table:table-cell>
          <table:table-cell office:value-type="float" office:value="42432" table:style-name="ce2">
            <text:p>42432</text:p>
          </table:table-cell>
          <table:table-cell office:value-type="string" table:style-name="ce2">
            <text:p>https://s.alicdn.com/@sc04/kf/Hc4d8d1a7422847daa9ddc9377c9786fbc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de Sellado al Vacío para Alimentos Bropack VM400C/B, Máquina de Envasado al Vacío, Máquina de Sellado al Vacío</text:p>
          </table:table-cell>
          <table:table-cell office:value-type="float" office:value="2246.4" table:style-name="ce2">
            <text:p>2246,4</text:p>
          </table:table-cell>
          <table:table-cell office:value-type="string" table:style-name="ce2">
            <text:p>https://s.alicdn.com/@sc04/kf/Hb895f5e652f64f72911ed39e0c6f594f2.png_300x300.p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lanta de procesamiento de granos de cacao de alta calidad, trituradora de aceite de mantequilla de cacao, máquina de fabricación de polvo de cacao Natural</text:p>
          </table:table-cell>
          <table:table-cell office:value-type="float" office:value="121299.35999999999" table:style-name="ce2">
            <text:p>121299,36</text:p>
          </table:table-cell>
          <table:table-cell office:value-type="string" table:style-name="ce2">
            <text:p>https://s.alicdn.com/@sc04/kf/Hea2928387b994da8b3e8988b48df9e413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Empacadora de DZD-220 a Buen Precio de Fabricante Chino para Bolsitas de Té y Paquetes de Café Biodegradables</text:p>
          </table:table-cell>
          <table:table-cell office:value-type="float" office:value="4243.2" table:style-name="ce2">
            <text:p>4243,2</text:p>
          </table:table-cell>
          <table:table-cell office:value-type="string" table:style-name="ce2">
            <text:p>https://s.alicdn.com/@sc04/kf/He6999b92f846440ab826d91ca9943204v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automática para asar anacardos, máquina de procesamiento de anacardos</text:p>
          </table:table-cell>
          <table:table-cell office:value-type="float" office:value="4992" table:style-name="ce2">
            <text:p>4992</text:p>
          </table:table-cell>
          <table:table-cell office:value-type="string" table:style-name="ce2">
            <text:p>https://s.alicdn.com/@sc04/kf/HTB1bqAfXITxK1Rjy0Fgq6yovpXa2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Tostadora de Granos de Café Yoshan de 5Kg 6Kg 10Kg 12Kg 15Kg Comercial Automática de Aire Caliente Eléctrica a Gas para Uso Doméstico e Industrial</text:p>
          </table:table-cell>
          <table:table-cell office:value-type="float" office:value="15593.760000000002" table:style-name="ce2">
            <text:p>15593,76</text:p>
          </table:table-cell>
          <table:table-cell office:value-type="string" table:style-name="ce2">
            <text:p>https://s.alicdn.com/@sc04/kf/H08d16287a1ef45668d041c57383b4f86J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de Procesamiento de Polvo de Cacao para la Elaboración de Pasta de Cacao, Planta de Templado de Manteca de Cacao</text:p>
          </table:table-cell>
          <table:table-cell office:value-type="float" office:value="91902.720000000001" table:style-name="ce2">
            <text:p>91902,72</text:p>
          </table:table-cell>
          <table:table-cell office:value-type="string" table:style-name="ce2">
            <text:p>https://s.alicdn.com/@sc04/kf/Hcd2df650c08c421390a1edc9f5a3cd3eJ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de Envasado al Vacío para Bolsas Grandes y Empaques a Granel, Máquina Multifuncional de Sellado al Vacío para Alimentos</text:p>
          </table:table-cell>
          <table:table-cell office:value-type="float" office:value="10608" table:style-name="ce2">
            <text:p>10608</text:p>
          </table:table-cell>
          <table:table-cell office:value-type="string" table:style-name="ce2">
            <text:p>https://s.alicdn.com/@sc04/kf/Hb383f608f5604b0eb65a6f52debb943eS.png_300x300.p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para romper vainas de Cacao/equipo de procesamiento de corte de galleta de vaina de cacao fresco/máquina separadora de cáscara de cacao y frijol</text:p>
          </table:table-cell>
          <table:table-cell office:value-type="float" office:value="13416" table:style-name="ce2">
            <text:p>13416</text:p>
          </table:table-cell>
          <table:table-cell office:value-type="string" table:style-name="ce2">
            <text:p>https://s.alicdn.com/@sc04/kf/A49bd82e8185f40a48bdc1caaf5e8ecdcT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ostador de Café Yoshan de 6 kg, 10 kg, 12 kg y 15 kg, Tostadora de Café Eléctrica, Máquinas Industriales para Tostar Granos de Café</text:p>
          </table:table-cell>
          <table:table-cell office:value-type="float" office:value="15593.760000000002" table:style-name="ce2">
            <text:p>15593,76</text:p>
          </table:table-cell>
          <table:table-cell office:value-type="string" table:style-name="ce2">
            <text:p>https://s.alicdn.com/@sc04/kf/Hecc0df719cf14dc89649ec23fe39eec1X.png_300x300.p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de procesamiento de granos de cacao, línea de producción de mantequilla de cacao, máquina de molienda de polvo, precio</text:p>
          </table:table-cell>
          <table:table-cell office:value-type="float" office:value="7488" table:style-name="ce2">
            <text:p>7488</text:p>
          </table:table-cell>
          <table:table-cell office:value-type="string" table:style-name="ce2">
            <text:p>https://s.alicdn.com/@sc04/kf/H5f2f10cd93a74a808501ef1859103e79O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mosphere-sellador de bandeja de achine, máquina de envasado al vacío de alimentos congelados</text:p>
          </table:table-cell>
          <table:table-cell office:value-type="float" office:value="60216" table:style-name="ce2">
            <text:p>60216</text:p>
          </table:table-cell>
          <table:table-cell office:value-type="string" table:style-name="ce2">
            <text:p>https://s.alicdn.com/@sc04/kf/H20005d85a1e94c99a0aeb2588e56c7bcf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00 -- 400 kg/h Máquina de corte de fruta fresca de vaina de Cacao/Máquina de cribado de cáscara de cacao</text:p>
          </table:table-cell>
          <table:table-cell office:value-type="float" office:value="29203.200000000001" table:style-name="ce2">
            <text:p>29203,2</text:p>
          </table:table-cell>
          <table:table-cell office:value-type="string" table:style-name="ce2">
            <text:p>https://s.alicdn.com/@sc04/kf/Ha343824f878844fa8415f4ce9ee80196J.jpeg_300x300.jpe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de Envasado al Vacío Semiautomática de Doble Cámara DZ400/2SB Selladora para Bolsas de Película y Papel de Aluminio</text:p>
          </table:table-cell>
          <table:table-cell office:value-type="float" office:value="3744" table:style-name="ce2">
            <text:p>3744</text:p>
          </table:table-cell>
          <table:table-cell office:value-type="string" table:style-name="ce2">
            <text:p>https://s.alicdn.com/@sc04/kf/H1f9e8cef22bb44859e7626190eb52529O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nacardos comerciales, castañas industriales, columpio, tostador de granos de cacao, horno, máquina tostadora de nueces, precio a la venta</text:p>
          </table:table-cell>
          <table:table-cell office:value-type="float" office:value="6240" table:style-name="ce2">
            <text:p>6240</text:p>
          </table:table-cell>
          <table:table-cell office:value-type="string" table:style-name="ce2">
            <text:p>https://s.alicdn.com/@sc04/kf/HTB1S9eWbdzvK1RkSnfoq6zMwVXa9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automática de envasado al vacío de alimentos Sellador automático de bandejas</text:p>
          </table:table-cell>
          <table:table-cell office:value-type="float" office:value="249600" table:style-name="ce2">
            <text:p>249600</text:p>
          </table:table-cell>
          <table:table-cell office:value-type="string" table:style-name="ce2">
            <text:p>https://s.alicdn.com/@sc04/kf/He7153e3cf4f94d7ebfc00a58082f6ba4L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olino de piedra de cacao húmedo Máquina de molienda de refinador de Chocolate Melanger profesional para procesamiento de cacao</text:p>
          </table:table-cell>
          <table:table-cell office:value-type="float" office:value="17472" table:style-name="ce2">
            <text:p>17472</text:p>
          </table:table-cell>
          <table:table-cell office:value-type="string" table:style-name="ce2">
            <text:p>https://s.alicdn.com/@sc04/kf/Hc0428794644d4b9a82128357d920c764K.png_300x300.p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de envasado de alimentación de bolsas Doypack, máquina de envasado al vacío de sellado de llenado de bolsas prefabricadas Servo automático de arroz en grano de café tostado</text:p>
          </table:table-cell>
          <table:table-cell office:value-type="float" office:value="68640" table:style-name="ce2">
            <text:p>68640</text:p>
          </table:table-cell>
          <table:table-cell office:value-type="string" table:style-name="ce2">
            <text:p>https://s.alicdn.com/@sc04/kf/H4fa8cd8c785e4cfd8844611820d2aae03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ínea de Procesamiento Automática de Alta Eficiencia de Acero Inoxidable para Granos de Cacao y Nueces de Cacao para la Producción de Cacao en Polvo y Mantequilla</text:p>
          </table:table-cell>
          <table:table-cell office:value-type="float" office:value="248352" table:style-name="ce2">
            <text:p>248352</text:p>
          </table:table-cell>
          <table:table-cell office:value-type="string" table:style-name="ce2">
            <text:p>https://s.alicdn.com/@sc04/kf/H90cfa59e838749139c3ac7842c0277539.png_300x300.p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selladora al vacío de cámara comercial Bropack, máquinas de envasado al vacío de envasado de carne de alimentos VM500E</text:p>
          </table:table-cell>
          <table:table-cell office:value-type="float" office:value="4056" table:style-name="ce2">
            <text:p>4056</text:p>
          </table:table-cell>
          <table:table-cell office:value-type="string" table:style-name="ce2">
            <text:p>https://s.alicdn.com/@sc04/kf/H3c8c79b3cdee41a08c28112f813c3e11S.png_300x300.p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Tostadora de Tambor de Acero Inoxidable de Alta Calidad, 35-50 kg/tambor, para Anacardos/Castañas/Nueces de Avellana, con Tipos de Calentamiento a Gas/Eléctrico</text:p>
          </table:table-cell>
          <table:table-cell office:value-type="float" office:value="1248" table:style-name="ce2">
            <text:p>1248</text:p>
          </table:table-cell>
          <table:table-cell office:value-type="string" table:style-name="ce2">
            <text:p>https://s.alicdn.com/@sc04/kf/HTB1ibKRKxWYBuNjy1zkq6xGGpXaE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de Envasado al Vacío con Flujo de Gas de Alta Productividad, Máquina de Envasado de Comidas Preparadas en Atmósfera Modificada</text:p>
          </table:table-cell>
          <table:table-cell office:value-type="float" office:value="56153.760000000002" table:style-name="ce2">
            <text:p>56153,76</text:p>
          </table:table-cell>
          <table:table-cell office:value-type="string" table:style-name="ce2">
            <text:p>https://s.alicdn.com/@sc04/kf/H8d717279be0947bbbc77cc53982dc449M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clasificadora automática de cacahuetes, máquina procesadora de anacardo, máquinas procesadoras de almendras</text:p>
          </table:table-cell>
          <table:table-cell office:value-type="float" office:value="8736" table:style-name="ce2">
            <text:p>8736</text:p>
          </table:table-cell>
          <table:table-cell office:value-type="string" table:style-name="ce2">
            <text:p>https://s.alicdn.com/@sc04/kf/H794851cdbeb94d918d1cff73f0599711N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de envasado al vacío Vertical inclinable, sellador al vacío de café de harina líquida y en polvo para envasado al vacío de granos de café/sopa</text:p>
          </table:table-cell>
          <table:table-cell office:value-type="float" office:value="6845.2800000000007" table:style-name="ce2">
            <text:p>6845,28</text:p>
          </table:table-cell>
          <table:table-cell office:value-type="string" table:style-name="ce2">
            <text:p>https://s.alicdn.com/@sc04/kf/He84bcc47f3f84129abaf8804860338d6r.png_300x300.p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para asar granos, máquinas industriales para asar café, máquina para asar cacahuetes</text:p>
          </table:table-cell>
          <table:table-cell office:value-type="float" office:value="4842.2400000000007" table:style-name="ce2">
            <text:p>4842,24</text:p>
          </table:table-cell>
          <table:table-cell office:value-type="string" table:style-name="ce2">
            <text:p>https://s.alicdn.com/@sc04/kf/H3c100a6000ea4e52b60fdfb2dfd5a018e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áscula Lineal Automática de Alta Precisión de 4 Cabezales para Pesaje de 250G-500G, Sal, Azúcar, Granos de Café Premium, Llenado Vertical en Bolsas/Papel de Aluminio</text:p>
          </table:table-cell>
          <table:table-cell office:value-type="float" office:value="124800" table:style-name="ce2">
            <text:p>124800</text:p>
          </table:table-cell>
          <table:table-cell office:value-type="string" table:style-name="ce2">
            <text:p>https://s.alicdn.com/@sc04/kf/H8d09bb86c40249d7ba4ce8ea3a6a15510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de rotura/equipo de procesamiento de corte de galleta de vaina de cacao fresco/máquina separadora de cáscara y granos de cacao</text:p>
          </table:table-cell>
          <table:table-cell office:value-type="float" office:value="19968" table:style-name="ce2">
            <text:p>19968</text:p>
          </table:table-cell>
          <table:table-cell office:value-type="string" table:style-name="ce2">
            <text:p>https://s.alicdn.com/@sc04/kf/H051f0ba83ee84de99544b5c8be5c1167J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Selladora al Vacío de Alimentos FZ-260/400T Empacadora al Vacío</text:p>
          </table:table-cell>
          <table:table-cell office:value-type="float" office:value="4274.4000000000005" table:style-name="ce2">
            <text:p>4274,4</text:p>
          </table:table-cell>
          <table:table-cell office:value-type="string" table:style-name="ce2">
            <text:p>https://s.alicdn.com/@sc04/kf/H760dd1f66ef54ccd813af8e09ae3d1d7q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utomático Cacao Winnower pelado frijol de Cacao apartar Cacao descascarillado máquina</text:p>
          </table:table-cell>
          <table:table-cell office:value-type="float" office:value="20592" table:style-name="ce2">
            <text:p>20592</text:p>
          </table:table-cell>
          <table:table-cell office:value-type="string" table:style-name="ce2">
            <text:p>https://s.alicdn.com/@sc04/kf/HTB1mr6BawKG3KVjSZFLq6yMvXXaD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oypack Máquina de embalaje de alimentación de bolsas de sellado de llenado automático con función de vacío Máquina de embalaje de bolsas prefabricadas de arroz y granos de café</text:p>
          </table:table-cell>
          <table:table-cell office:value-type="float" office:value="56153.760000000002" table:style-name="ce2">
            <text:p>56153,76</text:p>
          </table:table-cell>
          <table:table-cell office:value-type="string" table:style-name="ce2">
            <text:p>https://s.alicdn.com/@sc04/kf/H3b9860ecdea94e2683bffdce67daf050u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ínea de Producción de Cacao Totalmente Automática para Procesamiento de Cacao Crudo, de Polvo de Cacao a Barra de Chocolate</text:p>
          </table:table-cell>
          <table:table-cell office:value-type="float" office:value="49913.760000000002" table:style-name="ce2">
            <text:p>49913,76</text:p>
          </table:table-cell>
          <table:table-cell office:value-type="string" table:style-name="ce2">
            <text:p>https://s.alicdn.com/@sc04/kf/Hfeac746367ff4eaa9722563e1abee1b1y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ostador de Café Eléctrico a Gas de 1kg 2kg 3kg 6kg 10kg 15kg 30kg 60kg 120kg Máquina para Tostar Café</text:p>
          </table:table-cell>
          <table:table-cell office:value-type="float" office:value="16536" table:style-name="ce2">
            <text:p>16536</text:p>
          </table:table-cell>
          <table:table-cell office:value-type="string" table:style-name="ce2">
            <text:p>https://s.alicdn.com/@sc04/kf/Hb6df6b4b15c740728b94006ae373387cs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áquina Descascaradora de Anacardos Automática de Buena Calidad / Planta Procesadora de Nueces de Anacardo</text:p>
          </table:table-cell>
          <table:table-cell office:value-type="float" office:value="4361.76" table:style-name="ce2">
            <text:p>4361,76</text:p>
          </table:table-cell>
          <table:table-cell office:value-type="string" table:style-name="ce2">
            <text:p>https://s.alicdn.com/@sc04/kf/Hfadee6d5bb8d4269bc32e3e303e198b3A.jpg</text:p>
          </table:table-cell>
          <table:table-cell table:number-columns-repeated="16381"/>
        </table:table-row>
        <table:table-row table:number-rows-repeated="10485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Hiperv_237_nculo" style:display-name="Hipervínculo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931</meta:generator>
    <meta:initial-creator>lito</meta:initial-creator>
    <dc:creator>lito</dc:creator>
    <meta:creation-date>2026-03-14T16:34:07Z</meta:creation-date>
    <dc:date>2026-03-21T20:45:00Z</dc:date>
    <meta:editing-duration>PT0S</meta:editing-duration>
  </office:meta>
</office:document-meta>
</file>